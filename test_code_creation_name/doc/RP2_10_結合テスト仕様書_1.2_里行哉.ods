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D000000AA587A542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ゴシック1" svg:font-family="'ＭＳ ゴシック', 'Noto Sans JP', 游ゴシック, メイリオ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5.006cm"/>
    </style:style>
    <style:style style:name="co5" style:family="table-column">
      <style:table-column-properties fo:break-before="auto" style:column-width="13.905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2.67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89cm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47cm" fo:break-before="auto" style:use-optimal-row-height="false"/>
    </style:style>
    <style:style style:name="ro22" style:family="table-row">
      <style:table-row-properties style:row-height="1.39cm" fo:break-before="auto" style:use-optimal-row-height="true"/>
    </style:style>
    <style:style style:name="ro23" style:family="table-row">
      <style:table-row-properties style:row-height="1.099cm" fo:break-before="auto" style:use-optimal-row-height="true"/>
    </style:style>
    <style:style style:name="ro24" style:family="table-row">
      <style:table-row-properties style:row-height="1.207cm" fo:break-before="auto" style:use-optimal-row-height="false"/>
    </style:style>
    <style:style style:name="ro25" style:family="table-row">
      <style:table-row-properties style:row-height="0.746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3cm" fo:break-before="auto" style:use-optimal-row-height="false"/>
    </style:style>
    <style:style style:name="ro28" style:family="table-row">
      <style:table-row-properties style:row-height="2.999cm" fo:break-before="auto" style:use-optimal-row-height="false"/>
    </style:style>
    <style:style style:name="ro29" style:family="table-row">
      <style:table-row-properties style:row-height="5.909cm" fo:break-before="auto" style:use-optimal-row-height="false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表紙">
      <style:table-properties table:display="true" style:writing-mode="lr-tb"/>
    </style:style>
    <style:style style:name="ta4" style:family="table" style:master-page-name="PageStyle_5f_ケース01">
      <style:table-properties table:display="true" style:writing-mode="lr-tb"/>
    </style:style>
    <style:style style:name="ta5" style:family="table" style:master-page-name="PageStyle_5f_ケース02">
      <style:table-properties table:display="true" style:writing-mode="lr-tb"/>
    </style:style>
    <style:style style:name="ta6" style:family="table" style:master-page-name="PageStyle_5f_ケース03">
      <style:table-properties table:display="true" style:writing-mode="lr-tb"/>
    </style:style>
    <style:style style:name="ta7" style:family="table" style:master-page-name="PageStyle_5f_ケース04">
      <style:table-properties table:display="true" style:writing-mode="lr-tb"/>
    </style:style>
    <style:style style:name="ta8" style:family="table" style:master-page-name="PageStyle_5f_ケース05">
      <style:table-properties table:display="true" style:writing-mode="lr-tb"/>
    </style:style>
    <style:style style:name="ta9" style:family="table" style:master-page-name="PageStyle_5f_ケース06">
      <style:table-properties table:display="true" style:writing-mode="lr-tb"/>
    </style:style>
    <style:style style:name="ta10" style:family="table" style:master-page-name="PageStyle_5f_ケース07">
      <style:table-properties table:display="true" style:writing-mode="lr-tb"/>
    </style:style>
    <style:style style:name="ta11" style:family="table" style:master-page-name="PageStyle_5f_ケース08">
      <style:table-properties table:display="true" style:writing-mode="lr-tb"/>
    </style:style>
    <style:style style:name="ta12" style:family="table" style:master-page-name="PageStyle_5f_ケース09">
      <style:table-properties table:display="true" style:writing-mode="lr-tb"/>
    </style:style>
    <style:style style:name="ta13" style:family="table" style:master-page-name="PageStyle_5f_ケース10">
      <style:table-properties table:display="true" style:writing-mode="lr-tb"/>
    </style:style>
    <style:style style:name="ta14" style:family="table" style:master-page-name="PageStyle_5f_ケース11">
      <style:table-properties table:display="true" style:writing-mode="lr-tb"/>
    </style:style>
    <style:style style:name="ta15" style:family="table" style:master-page-name="PageStyle_5f_ケース12">
      <style:table-properties table:display="true" style:writing-mode="lr-tb"/>
    </style:style>
    <style:style style:name="ta16" style:family="table" style:master-page-name="PageStyle_5f_ケース13">
      <style:table-properties table:display="true" style:writing-mode="lr-tb"/>
    </style:style>
    <style:style style:name="ta17" style:family="table" style:master-page-name="PageStyle_5f_ケース14">
      <style:table-properties table:display="true" style:writing-mode="lr-tb"/>
    </style:style>
    <style:style style:name="ta18" style:family="table" style:master-page-name="PageStyle_5f_ケース15">
      <style:table-properties table:display="true" style:writing-mode="lr-tb"/>
    </style:style>
    <style:style style:name="ta19" style:family="table" style:master-page-name="PageStyle_5f_ケース16">
      <style:table-properties table:display="true" style:writing-mode="lr-tb"/>
    </style:style>
    <style:style style:name="ta20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/>
    <style:style style:name="ce52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8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8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8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8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8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8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9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9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9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9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9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9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9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9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9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9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0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0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06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26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Default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lef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lef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fo:text-align="center"/>
    </style:style>
    <style:style style:name="T4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ff" style:font-name="ＭＳ ゴシック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ＭＳ ゴシック" style:font-size-asian="9pt" style:font-size-complex="9pt" style:font-weight-asian="normal" style:font-weight-complex="normal" style:font-style-asian="normal" style:font-style-complex="normal"/>
    </style:style>
    <style:style style:name="T9" style:family="text">
      <style:text-properties fo:color="#0000ff" style:font-name="ＭＳ ゴシック1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ＭＳ ゴシック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3" table:print-ranges="表紙.A1:表紙.E31">
        <office:forms form:automatic-focus="false" form:apply-design-mode="false"/>
        <table:table-column table:style-name="co3" table:default-cell-style-name="ce52"/>
        <table:table-column table:style-name="co4" table:number-columns-repeated="2" table:default-cell-style-name="ce52"/>
        <table:table-column table:style-name="co5" table:default-cell-style-name="ce52"/>
        <table:table-column table:style-name="co8" table:default-cell-style-name="ce52"/>
        <table:table-column table:style-name="co9" table:number-columns-repeated="252" table:default-cell-style-name="ce52"/>
        <table:table-row table:style-name="ro1" table:number-rows-repeated="3">
          <table:table-cell table:number-columns-repeated="257"/>
        </table:table-row>
        <table:table-row table:style-name="ro21">
          <table:table-cell/>
          <table:table-cell table:style-name="ce53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22">
          <table:table-cell/>
          <table:table-cell table:style-name="ce54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23">
          <table:table-cell/>
          <table:table-cell table:style-name="ce54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24">
          <table:table-cell/>
          <table:table-cell table:style-name="ce55" office:value-type="string" calcext:value-type="string">
            <text:p>更新履歴</text:p>
          </table:table-cell>
          <table:table-cell table:style-name="ce55" table:number-columns-repeated="2"/>
          <table:table-cell table:number-columns-repeated="253"/>
        </table:table-row>
        <table:table-row table:style-name="ro25">
          <table:table-cell/>
          <table:table-cell table:style-name="ce56" office:value-type="string" calcext:value-type="string">
            <text:p>年月日</text:p>
          </table:table-cell>
          <table:table-cell table:style-name="ce56" office:value-type="string" calcext:value-type="string">
            <text:p>担当者</text:p>
          </table:table-cell>
          <table:table-cell table:style-name="ce56" office:value-type="string" calcext:value-type="string">
            <text:p>内容</text:p>
          </table:table-cell>
          <table:table-cell table:number-columns-repeated="253"/>
        </table:table-row>
        <table:table-row table:style-name="ro25">
          <table:table-cell/>
          <table:table-cell table:style-name="ce58" office:value-type="date" office:date-value="2025-02-21" calcext:value-type="date">
            <text:p>2025/02/21</text:p>
          </table:table-cell>
          <table:table-cell table:style-name="ce64" office:value-type="string" calcext:value-type="string">
            <text:p>堀井</text:p>
          </table:table-cell>
          <table:table-cell table:style-name="ce64" office:value-type="string" calcext:value-type="string">
            <text:p>新規作成</text:p>
          </table:table-cell>
          <table:table-cell table:number-columns-repeated="253"/>
        </table:table-row>
        <table:table-row table:style-name="ro25">
          <table:table-cell/>
          <table:table-cell table:style-name="ce58" office:value-type="date" office:date-value="2026-06-19" calcext:value-type="date">
            <text:p>2026/06/19</text:p>
          </table:table-cell>
          <table:table-cell table:style-name="ce64" office:value-type="string" calcext:value-type="string">
            <text:p>里</text:p>
          </table:table-cell>
          <table:table-cell table:style-name="ce64" office:value-type="string" calcext:value-type="string">
            <text:p>ケース01、ケース02記入</text:p>
          </table:table-cell>
          <table:table-cell table:number-columns-repeated="253"/>
        </table:table-row>
        <table:table-row table:style-name="ro25">
          <table:table-cell/>
          <table:table-cell table:style-name="ce58" office:value-type="date" office:date-value="2026-06-19" calcext:value-type="date">
            <text:p>2026/06/19</text:p>
          </table:table-cell>
          <table:table-cell table:style-name="ce64" office:value-type="string" calcext:value-type="string">
            <text:p>里</text:p>
          </table:table-cell>
          <table:table-cell table:style-name="ce64" office:value-type="string" calcext:value-type="string">
            <text:p>ケース01、ケース02レビュー反映</text:p>
          </table:table-cell>
          <table:table-cell table:number-columns-repeated="253"/>
        </table:table-row>
        <table:table-row table:style-name="ro25">
          <table:table-cell/>
          <table:table-cell table:style-name="ce58" office:value-type="date" office:date-value="2026-06-22" calcext:value-type="date">
            <text:p>2026/06/22</text:p>
          </table:table-cell>
          <table:table-cell table:style-name="ce64" office:value-type="string" calcext:value-type="string">
            <text:p>里</text:p>
          </table:table-cell>
          <table:table-cell table:style-name="ce64" office:value-type="string" calcext:value-type="string">
            <text:p>ケース03、ケース04記入</text:p>
          </table:table-cell>
          <table:table-cell table:number-columns-repeated="253"/>
        </table:table-row>
        <table:table-row table:style-name="ro25">
          <table:table-cell/>
          <table:table-cell table:style-name="ce58" office:value-type="date" office:date-value="2026-06-22" calcext:value-type="date">
            <text:p>2026/06/22</text:p>
          </table:table-cell>
          <table:table-cell table:style-name="ce64" office:value-type="string" calcext:value-type="string">
            <text:p>里</text:p>
          </table:table-cell>
          <table:table-cell table:style-name="ce64" office:value-type="string" calcext:value-type="string">
            <text:p>ケース05、ケース06記入</text:p>
          </table:table-cell>
          <table:table-cell table:number-columns-repeated="253"/>
        </table:table-row>
        <table:table-row table:style-name="ro25">
          <table:table-cell/>
          <table:table-cell table:style-name="ce58" office:value-type="date" office:date-value="2026-06-22" calcext:value-type="date">
            <text:p>2026/06/22</text:p>
          </table:table-cell>
          <table:table-cell table:style-name="ce64" office:value-type="string" calcext:value-type="string">
            <text:p>里</text:p>
          </table:table-cell>
          <table:table-cell table:style-name="ce64" office:value-type="string" calcext:value-type="string">
            <text:p>ケース15記入</text:p>
          </table:table-cell>
          <table:table-cell table:number-columns-repeated="253"/>
        </table:table-row>
        <table:table-row table:style-name="ro25">
          <table:table-cell/>
          <table:table-cell table:style-name="ce58" office:value-type="date" office:date-value="2026-06-23" calcext:value-type="date">
            <text:p>2026/06/23</text:p>
          </table:table-cell>
          <table:table-cell table:style-name="ce64" office:value-type="string" calcext:value-type="string">
            <text:p>里</text:p>
          </table:table-cell>
          <table:table-cell table:style-name="ce64" office:value-type="string" calcext:value-type="string">
            <text:p>ケース16記入</text:p>
          </table:table-cell>
          <table:table-cell table:number-columns-repeated="253"/>
        </table:table-row>
        <table:table-row table:style-name="ro25">
          <table:table-cell/>
          <table:table-cell table:style-name="ce58" office:value-type="date" office:date-value="2026-06-24" calcext:value-type="date">
            <text:p>2026/06/24</text:p>
          </table:table-cell>
          <table:table-cell table:style-name="ce64" office:value-type="string" calcext:value-type="string">
            <text:p>里</text:p>
          </table:table-cell>
          <table:table-cell table:style-name="ce64" office:value-type="string" calcext:value-type="string">
            <text:p>ケース17記入</text:p>
          </table:table-cell>
          <table:table-cell table:number-columns-repeated="253"/>
        </table:table-row>
        <table:table-row table:style-name="ro25">
          <table:table-cell/>
          <table:table-cell table:style-name="ce63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63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48" table:default-cell-style-name="ce67"/>
        <table:table-column table:style-name="co7" table:default-cell-style-name="ce110"/>
        <table:table-column table:style-name="co6" table:number-columns-repeated="199" table:default-cell-style-name="ce114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68" office:value-type="string" calcext:value-type="string">
            <text:p>テストケース一覧</text:p>
          </table:table-cell>
          <table:table-cell table:style-name="ce68"/>
          <table:table-cell table:style-name="ce72"/>
          <table:table-cell table:style-name="ce75" table:number-columns-repeated="5"/>
          <table:table-cell table:style-name="ce66" table:number-columns-repeated="48"/>
          <table:table-cell table:style-name="ce111"/>
          <table:table-cell table:style-name="ce119" table:number-columns-repeated="16326"/>
        </table:table-row>
        <table:table-row table:style-name="ro1">
          <table:table-cell table:number-columns-repeated="54"/>
          <table:table-cell table:style-name="ce108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ケース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78"/>
          <table:covered-table-cell table:style-name="ce80"/>
          <table:table-cell table:style-name="ce76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78"/>
          <table:covered-table-cell table:style-name="ce80"/>
          <table:table-cell table:style-name="ce76" office:value-type="string" calcext:value-type="string" table:number-columns-spanned="31" table:number-rows-spanned="1">
            <text:p>概要</text:p>
          </table:table-cell>
          <table:covered-table-cell table:number-columns-repeated="29" table:style-name="ce78"/>
          <table:covered-table-cell table:style-name="ce80"/>
          <table:table-cell table:number-columns-repeated="2"/>
          <table:table-cell table:style-name="ce112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1.A1" xlink:type="simple">ログイン画面への遷移</text:a></text:span></text:p>
          </table:table-cell>
          <table:covered-table-cell table:number-columns-repeated="11" table:style-name="ce83"/>
          <table:covered-table-cell table:style-name="ce100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2.A1" xlink:type="simple">受講生 ログイン 認証失敗</text:a></text:span></text:p>
          </table:table-cell>
          <table:covered-table-cell table:number-columns-repeated="11" table:style-name="ce84"/>
          <table:covered-table-cell table:style-name="ce101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3.A1" xlink:type="simple">受講生 ログイン 正常系</text:a></text:span></text:p>
          </table:table-cell>
          <table:covered-table-cell table:number-columns-repeated="11" table:style-name="ce85"/>
          <table:covered-table-cell table:style-name="ce102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4.A1" xlink:type="simple">よくある質問画面への遷移</text:a></text:span></text:p>
          </table:table-cell>
          <table:covered-table-cell table:number-columns-repeated="12" table:style-name="ce86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5.A1" xlink:type="simple">キーワード検索 正常系</text:a></text:span></text:p>
          </table:table-cell>
          <table:covered-table-cell table:number-columns-repeated="12" table:style-name="ce87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6.A1" xlink:type="simple">カテゴリ検索 正常系</text:a></text:span></text:p>
          </table:table-cell>
          <table:covered-table-cell table:number-columns-repeated="12" table:style-name="ce88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7.A1" xlink:type="simple">受講生 レポート新規登録(日報) 正常系</text:a></text:span></text:p>
          </table:table-cell>
          <table:covered-table-cell table:number-columns-repeated="12" table:style-name="ce89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06"/>
          <table:table-cell table:number-columns-repeated="2"/>
          <table:table-cell table:style-name="ce113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8.A1" xlink:type="simple">受講生 レポート修正(週報) 正常系</text:a></text:span></text:p>
          </table:table-cell>
          <table:covered-table-cell table:number-columns-repeated="12" table:style-name="ce90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06"/>
          <table:table-cell table:number-columns-repeated="2"/>
          <table:table-cell table:style-name="ce113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09.A1" xlink:type="simple">受講生 レポート登録 入力チェック</text:a></text:span></text:p>
          </table:table-cell>
          <table:covered-table-cell table:number-columns-repeated="12" table:style-name="ce91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06"/>
          <table:table-cell table:number-columns-repeated="2"/>
          <table:table-cell table:style-name="ce113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10.A1" xlink:type="simple">受講生 勤怠登録 正常系</text:a></text:span></text:p>
          </table:table-cell>
          <table:covered-table-cell table:number-columns-repeated="12" table:style-name="ce92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06"/>
          <table:table-cell table:number-columns-repeated="2"/>
          <table:table-cell table:style-name="ce113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7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11.A1" xlink:type="simple">受講生 勤怠直接編集 正常系</text:a></text:span></text:p>
          </table:table-cell>
          <table:covered-table-cell table:number-columns-repeated="12" table:style-name="ce93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06"/>
          <table:table-cell table:number-columns-repeated="2"/>
          <table:table-cell table:style-name="ce113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7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12.A1" xlink:type="simple">受講生 勤怠直接編集 入力チェック</text:a></text:span></text:p>
          </table:table-cell>
          <table:covered-table-cell table:number-columns-repeated="12" table:style-name="ce94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06"/>
          <table:table-cell table:number-columns-repeated="2"/>
          <table:table-cell table:style-name="ce113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7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13.A1" xlink:type="simple">受講生 試験の実施 結果0点</text:a></text:span></text:p>
          </table:table-cell>
          <table:covered-table-cell table:number-columns-repeated="12" table:style-name="ce95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7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14.A1" xlink:type="simple">受講生 試験の実施 結果50点</text:a></text:span></text:p>
          </table:table-cell>
          <table:covered-table-cell table:number-columns-repeated="12" table:style-name="ce96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15.A1" xlink:type="simple">受講生 初回ログイン 利用規約に不同意</text:a></text:span></text:p>
          </table:table-cell>
          <table:covered-table-cell table:number-columns-repeated="12" table:style-name="ce97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06"/>
          <table:table-cell table:number-columns-repeated="2"/>
          <table:table-cell table:style-name="ce113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7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98"/>
          <table:covered-table-cell table:style-name="ce103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<text:a xlink:href="#ケース17.A1" xlink:type="simple">受講生 初回ログイン 正常系</text:a></text:span></text:p>
          </table:table-cell>
          <table:covered-table-cell table:number-columns-repeated="11" table:style-name="ce99"/>
          <table:covered-table-cell table:style-name="ce104"/>
          <table:table-cell table:style-name="ce106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07"/>
          <table:covered-table-cell table:style-name="ce109"/>
          <table:table-cell table:number-columns-repeated="2"/>
          <table:table-cell table:style-name="ce113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4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。</text:p>
          </table:table-cell>
          <table:covered-table-cell table:number-columns-repeated="26" table:style-name="ce183"/>
          <table:table-cell table:style-name="ce184" office:value-type="date" office:date-value="2026-06-18" calcext:value-type="date" table:number-columns-spanned="5" table:number-rows-spanned="1">
            <text:p>2026/6/18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"/>
          <table:table-cell table:number-columns-repeated="191"/>
        </table:table-row>
        <table:table-row table:style-name="ro28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" table:number-columns-spanned="3" table:number-rows-spanned="1"/>
          <table:covered-table-cell table:number-columns-repeated="2" table:style-name="ce185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5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。</text:p>
          </table:table-cell>
          <table:covered-table-cell table:number-columns-repeated="26" table:style-name="ce183"/>
          <table:table-cell table:style-name="ce184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DB登録されていないユーザーでログインを試みる</text:p>
            <text:p/>
            <text:p>入力値</text:p>
            <text:p>ログインID：abc12345</text:p>
            <text:p>パスワード：password123</text:p>
            <text:p/>
            <text:p>入力後ログインボタン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「* ログインに失敗しました。」とエラーメッセージが表示されログインされない</text:p>
          </table:table-cell>
          <table:covered-table-cell table:number-columns-repeated="26" table:style-name="ce183"/>
          <table:table-cell table:style-name="ce184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2" table:number-columns-spanned="3" table:number-rows-spanned="1"/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2" table:number-columns-spanned="3" table:number-rows-spanned="1"/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2" table:number-columns-spanned="3" table:number-rows-spanned="1"/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2" table:number-columns-spanned="3" table:number-rows-spanned="1"/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2" table:number-columns-spanned="3" table:number-rows-spanned="1"/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2" table:number-columns-spanned="3" table:number-rows-spanned="1"/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2" table:number-columns-spanned="3" table:number-rows-spanned="1"/>
          <table:covered-table-cell table:number-columns-repeated="2" table:style-name="ce185" table:content-validation-name="val2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2" table:number-columns-spanned="3" table:number-rows-spanned="1"/>
          <table:covered-table-cell table:number-columns-repeated="2" table:style-name="ce185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6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</text:p>
          </table:table-cell>
          <table:covered-table-cell table:number-columns-repeated="26" table:style-name="ce183"/>
          <table:table-cell table:style-name="ce184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3"/>
          <table:table-cell table:number-columns-repeated="191"/>
        </table:table-row>
        <table:table-row table:style-name="ro29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8">以下のSQL文を実行し、初回ログイン済みの受講生ユーザーを用意する</text:span></text:p>
            <text:p><text:span text:style-name="T8"/></text:p>
            <text:p><text:span text:style-name="T9">UPDATE m_user SET password_change_date = '2026/06/19/ 00:00:00' WHERE login_id = 'StudentAA01';</text:span></text:p>
            <text:p><text:span text:style-name="T9">UPDATE m_user SET security_agree_flg = 1 WHERE login_id = 'StudentAA01';</text:span></text:p>
            <text:p><text:span text:style-name="T9"/></text:p>
            <text:p><text:span text:style-name="T8">「StudentAA01」ユーザーでログインを行う</text:span></text:p>
            <text:p><text:span text:style-name="T8"/></text:p>
            <text:p><text:span text:style-name="T8">入力値</text:span></text:p>
            <text:p><text:span text:style-name="T8">ログインID：StudentAA01</text:span></text:p>
            <text:p><text:span text:style-name="T8">パスワード：StudentAA01</text:span></text:p>
            <text:p><text:span text:style-name="T8"/></text:p>
            <text:p><text:span text:style-name="T8">入力後ログインボタンを押下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コース詳細画面が表示され、ページ名が”コース詳細 ｜ LMS”となっていること</text:p>
          </table:table-cell>
          <table:covered-table-cell table:number-columns-repeated="26" table:style-name="ce183"/>
          <table:table-cell table:style-name="ce184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3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3" table:number-columns-spanned="3" table:number-rows-spanned="1"/>
          <table:covered-table-cell table:number-columns-repeated="2" table:style-name="ce185" table:content-validation-name="val3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3" table:number-columns-spanned="3" table:number-rows-spanned="1"/>
          <table:covered-table-cell table:number-columns-repeated="2" table:style-name="ce185" table:content-validation-name="val3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3" table:number-columns-spanned="3" table:number-rows-spanned="1"/>
          <table:covered-table-cell table:number-columns-repeated="2" table:style-name="ce185" table:content-validation-name="val3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3" table:number-columns-spanned="3" table:number-rows-spanned="1"/>
          <table:covered-table-cell table:number-columns-repeated="2" table:style-name="ce185" table:content-validation-name="val3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3" table:number-columns-spanned="3" table:number-rows-spanned="1"/>
          <table:covered-table-cell table:number-columns-repeated="2" table:style-name="ce185" table:content-validation-name="val3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3" table:number-columns-spanned="3" table:number-rows-spanned="1"/>
          <table:covered-table-cell table:number-columns-repeated="2" table:style-name="ce185" table:content-validation-name="val3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3" table:number-columns-spanned="3" table:number-rows-spanned="1"/>
          <table:covered-table-cell table:number-columns-repeated="2" table:style-name="ce185" table:content-validation-name="val3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3" table:number-columns-spanned="3" table:number-rows-spanned="1"/>
          <table:covered-table-cell table:number-columns-repeated="2" table:style-name="ce185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7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「StudentAA01」ユーザーでログインを行う</text:p>
            <text:p/>
            <text:p>入力値</text:p>
            <text:p>ログインID：StudentAA01</text:p>
            <text:p>パスワード：StudentAA01</text:p>
            <text:p/>
            <text:p>入力後ログイン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コース詳細画面が表示され、ページ名が”コース詳細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ヘッダーの「機能」タブから「ヘルプ」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ヘルプ画面が表示され、ページ名が”ヘルプ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ヘルプ画面で「よくある質問」リンク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よくある質問画面が表示され、ページ名が”よくある質問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4" table:number-columns-spanned="3" table:number-rows-spanned="1"/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4" table:number-columns-spanned="3" table:number-rows-spanned="1"/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4" table:number-columns-spanned="3" table:number-rows-spanned="1"/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4" table:number-columns-spanned="3" table:number-rows-spanned="1"/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4" table:number-columns-spanned="3" table:number-rows-spanned="1"/>
          <table:covered-table-cell table:number-columns-repeated="2" table:style-name="ce185" table:content-validation-name="val4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4" table:number-columns-spanned="3" table:number-rows-spanned="1"/>
          <table:covered-table-cell table:number-columns-repeated="2" table:style-name="ce185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8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「StudentAA01」ユーザーでログインを行う</text:p>
            <text:p/>
            <text:p>入力値</text:p>
            <text:p>ログインID：StudentAA01</text:p>
            <text:p>パスワード：StudentAA01</text:p>
            <text:p/>
            <text:p>入力後ログイン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コース詳細画面が表示され、ページ名が”コース詳細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ヘッダーの「機能」タブから「ヘルプ」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ヘルプ画面が表示され、ページ名が”ヘルプ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ヘルプ画面で「よくある質問」リンク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よくある質問画面が表示され、ページ名が”よくある質問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キーワード検索欄で検索を行う</text:p>
            <text:p/>
            <text:p>入力値</text:p>
            <text:p>キーワード：研修</text:p>
            <text:p/>
            <text:p>入力後「検索」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「助成金書類の作成方法が分かりません」</text:p>
            <text:p>「研修の申し込みはどのようにすれば良いですか？」</text:p>
            <text:p>の2項目のみ表示される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「クリア」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入力したキーワード「研修」が削除される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5" table:number-columns-spanned="3" table:number-rows-spanned="1"/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5" table:number-columns-spanned="3" table:number-rows-spanned="1"/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5" table:number-columns-spanned="3" table:number-rows-spanned="1"/>
          <table:covered-table-cell table:number-columns-repeated="2" table:style-name="ce185" table:content-validation-name="val5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5" table:number-columns-spanned="3" table:number-rows-spanned="1"/>
          <table:covered-table-cell table:number-columns-repeated="2" table:style-name="ce185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9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「StudentAA01」ユーザーでログインを行う</text:p>
            <text:p/>
            <text:p>入力値</text:p>
            <text:p>ログインID：StudentAA01</text:p>
            <text:p>パスワード：StudentAA01</text:p>
            <text:p/>
            <text:p>入力後ログイン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コース詳細画面が表示され、ページ名が”コース詳細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ヘッダーの「機能」タブから「ヘルプ」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ヘルプ画面が表示され、ページ名が”ヘルプ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ヘルプ画面で「よくある質問」リンク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よくある質問画面が表示され、ページ名が”よくある質問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カテゴリ検索を行う</text:p>
            <text:p>「【研修関係】」リンク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「キャンセル料・途中退校について」</text:p>
            <text:p>「研修の申し込みはどのようにすれば良いですか？」</text:p>
            <text:p>の2項目のみ表示される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検索結果の質問「キャンセル料・途中退校について」と「研修の申し込みはどのようにすれば良いですか？」を押下す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「受講者の退職や解雇等、やむを得ない事情による途中終了に関してなど、事情をお伺いした上で、協議という形を取らせて頂きます。弊社営業担当までご相談下さい。」</text:p>
            <text:p/>
            <text:p>「営業担当がいる場合は、営業担当までご連絡ください。申し込み方法についてご案内させていただきます。なお、弊社営業営業がいない場合は、東京ITスクール運営事務局までご連絡いただけると幸いです。」</text:p>
            <text:p/>
            <text:p>と回答が表示される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6" table:number-columns-spanned="3" table:number-rows-spanned="1"/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6" table:number-columns-spanned="3" table:number-rows-spanned="1"/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6" table:number-columns-spanned="3" table:number-rows-spanned="1"/>
          <table:covered-table-cell table:number-columns-repeated="2" table:style-name="ce185" table:content-validation-name="val6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6" table:number-columns-spanned="3" table:number-rows-spanned="1"/>
          <table:covered-table-cell table:number-columns-repeated="2" table:style-name="ce185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10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4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9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7" table:number-columns-spanned="3" table:number-rows-spanned="1"/>
          <table:covered-table-cell table:number-columns-repeated="2" table:style-name="ce193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1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4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9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8" table:number-columns-spanned="3" table:number-rows-spanned="1"/>
          <table:covered-table-cell table:number-columns-repeated="2" table:style-name="ce193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2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4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19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9" table:number-columns-spanned="3" table:number-rows-spanned="1"/>
          <table:covered-table-cell table:number-columns-repeated="2" table:style-name="ce193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3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4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9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4" table:number-columns-spanned="5" table:number-rows-spanned="1"/>
          <table:covered-table-cell table:number-columns-repeated="4" table:style-name="ce194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87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2">DB</text:span><text:span text:style-name="T2">データの「</text:span><text:span text:style-name="T2">DEMO</text:span><text:span text:style-name="T2">コース」は</text:span><text:span text:style-name="T2">2022</text:span><text:span text:style-name="T2">年の日付であるため、</text:span></text:p>
              <text:p text:style-name="P1"><text:span text:style-name="T2">テストを実施するにあたり、事前にコース情報を変更しておく必要がある。</text:span></text:p>
              <text:p text:style-name="P1"><text:span text:style-name="T2"/></text:p>
              <text:p text:style-name="P1"><text:span text:style-name="T2">【手順】</text:span></text:p>
              <text:p text:style-name="P1"><text:span text:style-name="T2">①管理者アカウントでログイン</text:span></text:p>
              <text:p text:style-name="P1"><text:span text:style-name="T2"/></text:p>
              <text:p text:style-name="P1"><text:span text:style-name="T2">②コース一覧 </text:span><text:span text:style-name="T2">&gt; DEMO</text:span><text:span text:style-name="T2">コースの変更ボタン </text:span><text:span text:style-name="T2">&gt; </text:span><text:span text:style-name="T2">コース変更画面</text:span></text:p>
              <text:p text:style-name="P1"><text:span text:style-name="T2">以下の日程に編集する。</text:span></text:p>
              <text:p text:style-name="P1"><text:span text:style-name="T2"/></text:p>
              <text:p text:style-name="P1"><text:span text:style-name="T2">　開始日 </text:span><text:span text:style-name="T2">-&gt; </text:span><text:span text:style-name="T3">テスト実行日の前日</text:span><text:span text:style-name="T2">（コース内容</text:span><text:span text:style-name="T2">:</text:span><text:span text:style-name="T2">ハードウェア、ソフトウェア、</text:span><text:span text:style-name="T2">WWW</text:span><text:span text:style-name="T2">）</text:span></text:p>
              <text:p text:style-name="P1"><text:span text:style-name="T2">　終了日 </text:span><text:span text:style-name="T2">-&gt; </text:span><text:span text:style-name="T3">テスト実行日</text:span><text:span text:style-name="T2">（コース内容</text:span><text:span text:style-name="T2">:</text:span><text:span text:style-name="T2">アルゴリズム、フローチャート）</text:span></text:p>
              <text:p text:style-name="P1"><text:span text:style-name="T2">　</text:span><text:span text:style-name="T5">計</text:span><text:span text:style-name="T5">2</text:span><text:span text:style-name="T5">日間に変更</text:span><text:span text:style-name="T2">し、決定ボタン。</text:span></text:p>
              <text:p text:style-name="P1"><text:span text:style-name="T2"/></text:p>
              <text:p text:style-name="P1"><text:span text:style-name="T2">③コース詳細変更画面で、余分なセクションとカテゴリーを削除し、決定ボタン。</text:span></text:p>
              <text:p text:style-name="P1"><text:span text:style-name="T2"/></text:p>
              <text:p text:style-name="P1"><text:span text:style-name="T2">④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0" table:number-columns-spanned="3" table:number-rows-spanned="1"/>
          <table:covered-table-cell table:number-columns-repeated="2" table:style-name="ce193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4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4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9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4" table:number-columns-spanned="5" table:number-rows-spanned="1"/>
          <table:covered-table-cell table:number-columns-repeated="4" table:style-name="ce194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1" table:number-columns-spanned="3" table:number-rows-spanned="1"/>
          <table:covered-table-cell table:number-columns-repeated="2" table:style-name="ce193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5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4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19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4" table:number-columns-spanned="5" table:number-rows-spanned="1"/>
          <table:covered-table-cell table:number-columns-repeated="4" table:style-name="ce194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2" table:number-columns-spanned="3" table:number-rows-spanned="1"/>
          <table:covered-table-cell table:number-columns-repeated="2" table:style-name="ce193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6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</text:p>
          </table:table-cell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8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「StudentAA01」ユーザーでログインを行う</text:p>
            <text:p/>
            <text:p>入力値</text:p>
            <text:p>ログインID：StudentAA01</text:p>
            <text:p>パスワード：StudentAA01</text:p>
            <text:p/>
            <text:p>入力後ログイン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コース詳細画面が表示され、ページ名が”コース詳細 ｜ LMS”となっていること</text:p>
          </table:table-cell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”試験有”となっているアルゴリズム、フローチャートコース欄の「詳細」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セクション詳細画面が表示され、ページ名が”セクション詳細 ｜ LMS”となっていること</text:p>
          </table:table-cell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95" office:value-type="string" calcext:value-type="string" table:number-columns-spanned="23" table:number-rows-spanned="1">
            <text:p>「本日の試験」エリアの「詳細」ボタンを押下</text:p>
          </table:table-cell>
          <table:covered-table-cell table:number-columns-repeated="22" table:style-name="ce195"/>
          <table:table-cell table:style-name="ce183" office:value-type="string" calcext:value-type="string" table:number-columns-spanned="27" table:number-rows-spanned="1">
            <text:p>試験開始画面が表示され、ページ名が”試験【ITリテラシー①】 | LMS”となっていること</text:p>
          </table:table-cell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95" office:value-type="string" calcext:value-type="string" table:number-columns-spanned="23" table:number-rows-spanned="1">
            <text:p>「試験を開始する」ボタンを押下</text:p>
          </table:table-cell>
          <table:covered-table-cell table:number-columns-repeated="22" table:style-name="ce195"/>
          <table:table-cell table:style-name="ce183" office:value-type="string" calcext:value-type="string" table:number-columns-spanned="27" table:number-rows-spanned="1">
            <text:p>試験問題画面が表示され、ページ名が”ITリテラシー①”となっていること</text:p>
          </table:table-cell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95" office:value-type="string" calcext:value-type="string" table:number-columns-spanned="23" table:number-rows-spanned="1">
            <text:p>すべての問題に未回答の状態で「確認画面へ進む」ボタンを押下</text:p>
          </table:table-cell>
          <table:covered-table-cell table:number-columns-repeated="22" table:style-name="ce195"/>
          <table:table-cell table:style-name="ce183" office:value-type="string" calcext:value-type="string" table:number-columns-spanned="27" table:number-rows-spanned="1">
            <text:p>試験解答確認画面が表示され、ページ名が”ITリテラシー①”となっていること</text:p>
          </table:table-cell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95" office:value-type="string" calcext:value-type="string" table:number-columns-spanned="23" table:number-rows-spanned="1">
            <text:p>「回答を送信する」ボタンを押下後、アラートの「OK」ボタンを押下</text:p>
          </table:table-cell>
          <table:covered-table-cell table:number-columns-repeated="22" table:style-name="ce195"/>
          <table:table-cell table:style-name="ce183" office:value-type="string" calcext:value-type="string" table:number-columns-spanned="27" table:number-rows-spanned="1">
            <text:p>試験結果画面が表示され、ページ名が”ITリテラシー①”となっていること</text:p>
          </table:table-cell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「戻る」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試験開始画面が表示され、ページ名が”試験【ITリテラシー①】 | LMS”となっていること</text:p>
            <text:p>当該試験の結果が0点として反映されていること</text:p>
          </table:table-cell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3" table:number-columns-spanned="3" table:number-rows-spanned="1"/>
          <table:covered-table-cell table:number-columns-repeated="2" table:style-name="ce185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7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4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66" table:number-columns-repeated="39"/>
          <table:table-cell table:style-name="ce119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2" table:style-name="ce187"/>
          <table:table-cell table:style-name="ce187" table:number-columns-spanned="27" table:number-rows-spanned="1"/>
          <table:covered-table-cell table:number-columns-repeated="25" table:style-name="ce60"/>
          <table:covered-table-cell table:style-name="ce62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87" table:number-columns-spanned="23" table:number-rows-spanned="1"/>
          <table:covered-table-cell table:number-columns-repeated="21" table:style-name="ce60"/>
          <table:covered-table-cell table:style-name="ce62"/>
          <table:table-cell table:style-name="ce187" table:number-columns-spanned="27" table:number-rows-spanned="1"/>
          <table:covered-table-cell table:number-columns-repeated="26" table:style-name="ce187"/>
          <table:table-cell table:style-name="ce192" table:number-columns-spanned="5" table:number-rows-spanned="1"/>
          <table:covered-table-cell table:number-columns-repeated="4" table:style-name="ce192"/>
          <table:table-cell table:style-name="ce193" table:number-columns-spanned="4" table:number-rows-spanned="1"/>
          <table:covered-table-cell table:number-columns-repeated="3" table:style-name="ce193"/>
          <table:table-cell table:style-name="ce193" table:content-validation-name="val14" table:number-columns-spanned="3" table:number-rows-spanned="1"/>
          <table:covered-table-cell table:number-columns-repeated="2" table:style-name="ce193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8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DBに初期登録された「StudentAA03」でログインする</text:p>
            <text:p/>
            <text:p>入力値</text:p>
            <text:p>ログインID：StudentAA03</text:p>
            <text:p>パスワード：StudentAA03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利用規約画面が表示され、ページ名が”セキュリティ規約 ｜ LMS”となってい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95" office:value-type="string" calcext:value-type="string" table:number-columns-spanned="23" table:number-rows-spanned="1">
            <text:p>「同意します」にチェックせず「次へ」ボタンを押下</text:p>
          </table:table-cell>
          <table:covered-table-cell table:number-columns-repeated="22" table:style-name="ce195"/>
          <table:table-cell table:style-name="ce183" office:value-type="string" calcext:value-type="string" table:number-columns-spanned="27" table:number-rows-spanned="1">
            <text:p>利用規約画面のまま「セキュリティ規約への同意は必須です。」とエラーメッセージが表示されること</text:p>
          </table:table-cell>
          <table:covered-table-cell table:number-columns-repeated="26" table:style-name="ce183"/>
          <table:table-cell table:style-name="ce184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5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5" table:number-columns-spanned="3" table:number-rows-spanned="1"/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5" table:number-columns-spanned="3" table:number-rows-spanned="1"/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5" table:number-columns-spanned="3" table:number-rows-spanned="1"/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5" table:number-columns-spanned="3" table:number-rows-spanned="1"/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5" table:number-columns-spanned="3" table:number-rows-spanned="1"/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5" table:number-columns-spanned="3" table:number-rows-spanned="1"/>
          <table:covered-table-cell table:number-columns-repeated="2" table:style-name="ce185" table:content-validation-name="val15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5" table:number-columns-spanned="3" table:number-rows-spanned="1"/>
          <table:covered-table-cell table:number-columns-repeated="2" table:style-name="ce185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9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<text:span text:style-name="T7"><text:a xlink:href="http://localhost:8080/lms/へアクセス" xlink:type="simple">http://localhost:8080/lms/へアクセス</text:a></text:span>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</text:p>
          </table:table-cell>
          <table:covered-table-cell table:number-columns-repeated="26" table:style-name="ce183"/>
          <table:table-cell table:style-name="ce18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DBに初期登録された「StudentAA04」でログインする</text:p>
            <text:p/>
            <text:p>入力値</text:p>
            <text:p>ログインID：StudentAA04</text:p>
            <text:p>パスワード：StudentAA04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利用規約画面が表示され、ページ名が”セキュリティ規約 ｜ LMS”となっていること</text:p>
          </table:table-cell>
          <table:covered-table-cell table:number-columns-repeated="26" table:style-name="ce183"/>
          <table:table-cell table:style-name="ce18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「同意します」にチェックを入れ次へボタン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パスワード変更画面が表示され、ページ名が”パスワード変更 ｜ LMS”となっていること</text:p>
          </table:table-cell>
          <table:covered-table-cell table:number-columns-repeated="26" table:style-name="ce183"/>
          <table:table-cell table:style-name="ce18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全ての入力欄を未入力のまま変更ボタンを押下</text:p>
            <text:p>その後確認モーダルウィンドウの変更ボタンを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現在のパスワード：「現在のパスワードは必須です。」</text:p>
            <text:p>新しいパスワード：「「パスワード」には半角英数字のみ使用可能です。また、半角英大文字、半角英小文字、数字を含めた8～20文字を入力してください。</text:p>
            <text:p>パスワードは必須です。」</text:p>
            <text:p>確認パスワード：「確認パスワードは必須です。」</text:p>
            <text:p>と各種エラーメッセージが表示される</text:p>
          </table:table-cell>
          <table:covered-table-cell table:number-columns-repeated="26" table:style-name="ce183"/>
          <table:table-cell table:style-name="ce18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変更パスワードを20文字以上で変更を行う</text:p>
            <text:p/>
            <text:p>入力値</text:p>
            <text:p>現在のパスワード：StudentAA04</text:p>
            <text:p>新しいパスワード：NewPasswordNewPassword123</text:p>
            <text:p>確認パスワード：NewPasswordNewPassword123</text:p>
            <text:p/>
            <text:p>入力後「変更」ボタン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「パスワードの長さが最大値(20)を超えています。」とエラーメッセージが表示される</text:p>
          </table:table-cell>
          <table:covered-table-cell table:number-columns-repeated="26" table:style-name="ce183"/>
          <table:table-cell table:style-name="ce18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ポリシーに合わないパスワードを入力し「変更」ボタン押下</text:p>
            <text:p/>
            <text:p>入力値</text:p>
            <text:p>現在のパスワード：StudentAA04</text:p>
            <text:p>新しいパスワード：NewPassword</text:p>
            <text:p>確認パスワード：NewPassword</text:p>
            <text:p/>
            <text:p>入力後「変更」ボタン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「「パスワード」には半角英数字のみ使用可能です。また、半角英大文字、半角英小文字、数字を含めた8～20文字を入力してください。」とエラーメッセージが表示される</text:p>
          </table:table-cell>
          <table:covered-table-cell table:number-columns-repeated="26" table:style-name="ce183"/>
          <table:table-cell table:style-name="ce18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一致しない確認パスワードを入力し「変更」ボタン押下</text:p>
            <text:p/>
            <text:p>入力値</text:p>
            <text:p>現在のパスワード：StudentAA04</text:p>
            <text:p>新しいパスワード：NewPassword123</text:p>
            <text:p>確認パスワード：DifferentPass123</text:p>
            <text:p/>
            <text:p>入力後「変更」ボタン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「パスワードと確認パスワードが一致しません」とエラーメッセージが表示される</text:p>
          </table:table-cell>
          <table:covered-table-cell table:number-columns-repeated="26" table:style-name="ce183"/>
          <table:table-cell table:style-name="ce184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6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6" table:number-columns-spanned="3" table:number-rows-spanned="1"/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6" table:number-columns-spanned="3" table:number-rows-spanned="1"/>
          <table:covered-table-cell table:number-columns-repeated="2" table:style-name="ce185" table:content-validation-name="val16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6" table:number-columns-spanned="3" table:number-rows-spanned="1"/>
          <table:covered-table-cell table:number-columns-repeated="2" table:style-name="ce185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20">
        <office:forms form:automatic-focus="false" form:apply-design-mode="false"/>
        <table:table-column table:style-name="co11" table:number-columns-repeated="4" table:default-cell-style-name="ce123"/>
        <table:table-column table:style-name="co11" table:number-columns-repeated="5" table:default-cell-style-name="ce129"/>
        <table:table-column table:style-name="co11" table:number-columns-repeated="248" table:default-cell-style-name="ce123"/>
        <table:table-row table:style-name="ro1">
          <table:table-cell table:style-name="ce121"/>
          <table:table-cell table:number-columns-repeated="256"/>
        </table:table-row>
        <table:table-row table:style-name="ro7">
          <table:table-cell table:style-name="ce122"/>
          <table:table-cell table:style-name="ce124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124"/>
          <table:table-cell table:style-name="ce127"/>
          <table:table-cell table:style-name="ce130"/>
          <table:table-cell table:style-name="ce182" table:formula="of:=['file:///C:/Users/user/git/lms-test-src-rp2-sato/test_code_creation_name/doc/RP2_10_%E7%B5%90%E5%90%88%E3%83%86%E3%82%B9%E3%83%88%E4%BB%95%E6%A7%98%E6%9B%B8_1.1_%E9%87%8C%E8%A1%8C%E5%93%89.xls'#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182"/>
          <table:table-cell table:style-name="ce122" table:number-columns-repeated="230"/>
        </table:table-row>
        <table:table-row table:style-name="ro1">
          <table:table-cell table:number-columns-repeated="257"/>
        </table:table-row>
        <table:table-row table:style-name="ro26">
          <table:table-cell/>
          <table:table-cell table:style-name="ce125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125"/>
          <table:table-cell table:style-name="ce143" office:value-type="string" calcext:value-type="string" table:number-columns-spanned="23" table:number-rows-spanned="1">
            <text:p>操作</text:p>
          </table:table-cell>
          <table:covered-table-cell table:number-columns-repeated="22" table:style-name="ce143"/>
          <table:table-cell table:style-name="ce143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143"/>
          <table:table-cell table:style-name="ce143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143"/>
          <table:table-cell table:style-name="ce143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143"/>
          <table:table-cell table:style-name="ce143" office:value-type="string" calcext:value-type="string" table:number-columns-spanned="3" table:number-rows-spanned="1">
            <text:p>合否</text:p>
          </table:table-cell>
          <table:covered-table-cell table:number-columns-repeated="2" table:style-name="ce143"/>
          <table:table-cell table:number-columns-repeated="191"/>
        </table:table-row>
        <table:table-row table:style-name="ro27">
          <table:table-cell/>
          <table:table-cell table:style-name="ce12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26"/>
          <table:table-cell table:style-name="ce172" table:number-columns-spanned="23" table:number-rows-spanned="1">
            <draw:frame draw:z-index="0" draw:name="画像 1" draw:style-name="gr2" draw:text-style-name="P3" svg:width="11.523cm" svg:height="3.035cm" svg:x="0cm" svg:y="0cm">
              <draw:image xlink:href="Pictures/100000000000027D000000AA587A5422.png" xlink:type="simple" xlink:show="embed" xlink:actuate="onLoad" draw:mime-type="image/png">
                <text:p/>
              </draw:image>
            </draw:frame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ログイン画面が表示され、ページ名が”ログイン ｜ LMS”となっていること</text:p>
          </table:table-cell>
          <table:covered-table-cell table:number-columns-repeated="26" table:style-name="ce183"/>
          <table:table-cell table:style-name="ce18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7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DBに初期登録された「StudentAA06」でログインする</text:p>
            <text:p/>
            <text:p>入力値</text:p>
            <text:p>ログインID：StudentAA06</text:p>
            <text:p>パスワード：StudentAA06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利用規約画面が表示され、ページ名が”セキュリティ規約 ｜ LMS”となっていること</text:p>
          </table:table-cell>
          <table:covered-table-cell table:number-columns-repeated="26" table:style-name="ce183"/>
          <table:table-cell table:style-name="ce18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7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「同意します」にチェックを入れ次へボタン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パスワード変更画面が表示され、ページ名が”パスワード変更 ｜ LMS”となっていること</text:p>
          </table:table-cell>
          <table:covered-table-cell table:number-columns-repeated="26" table:style-name="ce183"/>
          <table:table-cell table:style-name="ce18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7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26"/>
          <table:table-cell table:style-name="ce172" office:value-type="string" calcext:value-type="string" table:number-columns-spanned="23" table:number-rows-spanned="1">
            <text:p>パスワード変更を行う</text:p>
            <text:p/>
            <text:p>入力値</text:p>
            <text:p>現在のパスワード：StudentAA06</text:p>
            <text:p>新しいパスワード：NewPassword123</text:p>
            <text:p>確認パスワード：NewPassword123</text:p>
            <text:p/>
            <text:p>入力後「変更」ボタン押下、表示されるポップアップ内の「変更」ボタン押下</text:p>
          </table:table-cell>
          <table:covered-table-cell table:number-columns-repeated="22" table:style-name="ce172"/>
          <table:table-cell table:style-name="ce183" office:value-type="string" calcext:value-type="string" table:number-columns-spanned="27" table:number-rows-spanned="1">
            <text:p>コース詳細画面が表示され、ページ名が”コース詳細 ｜ LMS”となっていること</text:p>
          </table:table-cell>
          <table:covered-table-cell table:number-columns-repeated="26" table:style-name="ce183"/>
          <table:table-cell table:style-name="ce184" office:value-type="date" office:date-value="2026-06-24" calcext:value-type="date" table:number-columns-spanned="5" table:number-rows-spanned="1">
            <text:p>2026/6/24</text:p>
          </table:table-cell>
          <table:covered-table-cell table:number-columns-repeated="4" table:style-name="ce184"/>
          <table:table-cell table:style-name="ce185" office:value-type="string" calcext:value-type="string" table:number-columns-spanned="4" table:number-rows-spanned="1">
            <text:p>里</text:p>
          </table:table-cell>
          <table:covered-table-cell table:number-columns-repeated="3" table:style-name="ce185"/>
          <table:table-cell table:style-name="ce185" table:content-validation-name="val17" office:value-type="string" calcext:value-type="string" table:number-columns-spanned="3" table:number-rows-spanned="1">
            <text:p>OK</text:p>
          </table:table-cell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7" table:number-columns-spanned="3" table:number-rows-spanned="1"/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7" table:number-columns-spanned="3" table:number-rows-spanned="1"/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7" table:number-columns-spanned="3" table:number-rows-spanned="1"/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7" table:number-columns-spanned="3" table:number-rows-spanned="1"/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7" table:number-columns-spanned="3" table:number-rows-spanned="1"/>
          <table:covered-table-cell table:number-columns-repeated="2" table:style-name="ce185" table:content-validation-name="val17"/>
          <table:table-cell table:number-columns-repeated="191"/>
        </table:table-row>
        <table:table-row table:style-name="ro27">
          <table:table-cell/>
          <table:table-cell table:style-name="ce1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6"/>
          <table:table-cell table:style-name="ce172" table:number-columns-spanned="23" table:number-rows-spanned="1"/>
          <table:covered-table-cell table:number-columns-repeated="22" table:style-name="ce172"/>
          <table:table-cell table:style-name="ce183" table:number-columns-spanned="27" table:number-rows-spanned="1"/>
          <table:covered-table-cell table:number-columns-repeated="26" table:style-name="ce183"/>
          <table:table-cell table:style-name="ce184" table:number-columns-spanned="5" table:number-rows-spanned="1"/>
          <table:covered-table-cell table:number-columns-repeated="4" table:style-name="ce184"/>
          <table:table-cell table:style-name="ce185" table:number-columns-spanned="4" table:number-rows-spanned="1"/>
          <table:covered-table-cell table:number-columns-repeated="3" table:style-name="ce185"/>
          <table:table-cell table:style-name="ce185" table:content-validation-name="val17" table:number-columns-spanned="3" table:number-rows-spanned="1"/>
          <table:covered-table-cell table:number-columns-repeated="2" table:style-name="ce185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'file:///C:/Users/user/git/lms-test-src-rp2-sato/test_code_creation_name/doc/RP2_10_%E7%B5%90%E5%90%88%E3%83%86%E3%82%B9%E3%83%88%E4%BB%95%E6%A7%98%E6%9B%B8_1.1_%E9%87%8C%E8%A1%8C%E5%93%89.xls'#ケース一覧" table:print="false" table:style-name="ta_extref">
        <table:table-source xlink:type="simple" xlink:href="../../git/lms-test-src-rp2-sato/test_code_creation_name/doc/RP2_10_%E7%B5%90%E5%90%88%E3%83%86%E3%82%B9%E3%83%88%E4%BB%95%E6%A7%98%E6%9B%B8_1.1_%E9%87%8C%E8%A1%8C%E5%93%89.xls" table:table-name="ケース一覧" table:filter-name="MS Excel 97" table:mode="copy-results-only"/>
        <table:table-column table:number-columns-repeated="12"/>
        <table:table-row table:number-rows-repeated="4">
          <table:table-cell table:number-columns-repeated="12"/>
        </table:table-row>
        <table:table-row>
          <table:table-cell table:number-columns-repeated="11"/>
          <table:table-cell table:style-name="ce51" office:value-type="string">
            <text:p>ログイン画面への遷移</text:p>
          </table:table-cell>
        </table:table-row>
        <table:table-row>
          <table:table-cell table:number-columns-repeated="11"/>
          <table:table-cell table:style-name="ce51" office:value-type="string">
            <text:p>受講生 ログイン 認証失敗</text:p>
          </table:table-cell>
        </table:table-row>
        <table:table-row>
          <table:table-cell table:number-columns-repeated="11"/>
          <table:table-cell table:style-name="ce51" office:value-type="string">
            <text:p>受講生 ログイン 正常系</text:p>
          </table:table-cell>
        </table:table-row>
        <table:table-row>
          <table:table-cell table:number-columns-repeated="11"/>
          <table:table-cell table:style-name="ce51" office:value-type="string">
            <text:p>よくある質問画面への遷移</text:p>
          </table:table-cell>
        </table:table-row>
        <table:table-row>
          <table:table-cell table:number-columns-repeated="11"/>
          <table:table-cell table:style-name="ce51" office:value-type="string">
            <text:p>キーワード検索 正常系</text:p>
          </table:table-cell>
        </table:table-row>
        <table:table-row>
          <table:table-cell table:number-columns-repeated="11"/>
          <table:table-cell table:style-name="ce51" office:value-type="string">
            <text:p>カテゴリ検索 正常系</text:p>
          </table:table-cell>
        </table:table-row>
        <table:table-row table:number-rows-repeated="6">
          <table:table-cell table:number-columns-repeated="12"/>
        </table:table-row>
        <table:table-row>
          <table:table-cell table:number-columns-repeated="11"/>
          <table:table-cell table:style-name="ce51" office:value-type="string">
            <text:p>受講生 試験の実施 結果0点</text:p>
          </table:table-cell>
        </table:table-row>
        <table:table-row>
          <table:table-cell table:number-columns-repeated="12"/>
        </table:table-row>
        <table:table-row>
          <table:table-cell table:number-columns-repeated="11"/>
          <table:table-cell table:style-name="ce51" office:value-type="string">
            <text:p>受講生 初回ログイン 利用規約に不同意</text:p>
          </table:table-cell>
        </table:table-row>
        <table:table-row>
          <table:table-cell table:number-columns-repeated="11"/>
          <table:table-cell table:style-name="ce51" office:value-type="string">
            <text:p>受講生 初回ログイン パスワード変更 入力チェック</text:p>
          </table:table-cell>
        </table:table-row>
        <table:table-row>
          <table:table-cell table:number-columns-repeated="11"/>
          <table:table-cell table:style-name="ce51" office:value-type="string">
            <text:p>受講生 初回ログイン 正常系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ゴシック1" svg:font-family="'ＭＳ ゴシック', 'Noto Sans JP', 游ゴシック, メイリオ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number:currency-style style:name="N10129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0129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ja" number:country="JP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0130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0131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ja" number:country="JP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0132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5" number:language="ja" number:country="JP">
      <number:hours/>
      <number:text>時</number:text>
      <number:minutes number:style="long"/>
      <number:text>分</number:text>
    </number:time-style>
    <number:time-style style:name="N1013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7" number:language="ja" number:country="JP">
      <number:year number:style="long"/>
      <number:text>年</number:text>
      <number:month/>
      <number:text>月</number:text>
    </number:date-style>
    <number:date-style style:name="N10138" number:language="ja" number:country="JP">
      <number:month/>
      <number:text>月</number:text>
      <number:day/>
      <number:text>日</number:text>
    </number:date-style>
    <number:number-style style:name="N1013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39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40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4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41P0"/>
    </number:number-style>
    <number:number-style style:name="N1014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4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4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0:16:31.391032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5T10:21:44.028144200</dc:date>
    <meta:print-date>2025-02-21T15:24:43</meta:print-date>
    <meta:editing-duration>PT9H11M44S</meta:editing-duration>
    <meta:editing-cycles>51</meta:editing-cycles>
    <meta:generator>LibreOffice/26.2.4.2$Windows_X86_64 LibreOffice_project/0229ac93fcf0d7cbc6376066c6f35021cef002dc</meta:generator>
    <meta:document-statistic meta:table-count="19" meta:cell-count="620" meta:object-count="1"/>
  </office:meta>
</office:document-meta>
</file>